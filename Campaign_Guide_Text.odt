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Medium" svg:font-family="'Montserrat Mediu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b7d8" officeooo:paragraph-rsid="000bb7d8"/>
    </style:style>
    <style:style style:name="P2" style:family="paragraph" style:parent-style-name="Standard">
      <style:text-properties officeooo:paragraph-rsid="000d9fb1"/>
    </style:style>
    <style:style style:name="P3" style:family="paragraph" style:parent-style-name="Standard">
      <style:text-properties officeooo:paragraph-rsid="000bb7d8"/>
    </style:style>
    <style:style style:name="P4" style:family="paragraph" style:parent-style-name="Comment">
      <style:paragraph-properties fo:margin-top="0.1654in" fo:margin-bottom="0.1374in"/>
      <style:text-properties fo:font-size="12pt" fo:font-weight="bold" style:font-size-asian="12pt" style:font-weight-asian="bold" style:font-size-complex="12pt" style:font-weight-complex="bold"/>
    </style:style>
    <style:style style:name="P5" style:family="paragraph" style:parent-style-name="Comment">
      <style:paragraph-properties fo:margin-top="0.1654in" fo:margin-bottom="0.1374in" fo:text-align="left"/>
      <style:text-properties fo:font-size="10pt" style:font-size-asian="10pt" style:font-size-complex="10pt"/>
    </style:style>
    <style:style style:name="P6" style:family="paragraph" style:parent-style-name="Comment">
      <style:paragraph-properties fo:margin-top="0.1654in" fo:margin-bottom="0.1374in" fo:text-align="left"/>
      <style:text-properties fo:font-size="12pt" fo:font-weight="bold" style:font-size-asian="12pt" style:font-weight-asian="bold" style:font-size-complex="12pt" style:font-weight-complex="bold"/>
    </style:style>
    <style:style style:name="P7" style:family="paragraph" style:parent-style-name="Standard">
      <style:text-properties officeooo:rsid="001427c5" officeooo:paragraph-rsid="001427c5"/>
    </style:style>
    <style:style style:name="P8" style:family="paragraph" style:parent-style-name="Standard">
      <style:paragraph-properties fo:break-before="page"/>
      <style:text-properties officeooo:paragraph-rsid="000bb7d8"/>
    </style:style>
    <style:style style:name="T1" style:family="text">
      <style:text-properties officeooo:rsid="000bb7d8"/>
    </style:style>
    <style:style style:name="T2" style:family="text">
      <style:text-properties officeooo:rsid="000d9f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ms to have (Maybe)</text:p>
      <text:p text:style-name="Standard">- <text:span text:style-name="T1">Pronunciation Guide (?)</text:span></text:p>
      <text:p text:style-name="Standard">- <text:span text:style-name="T1">Setting Presentation</text:span></text:p>
      <text:p text:style-name="Standard"><text:tab/>- <text:span text:style-name="T2">General Overview</text:span></text:p>
      <text:p text:style-name="P2"><text:tab/>- <text:span text:style-name="T2">Pantheon Presentation</text:span></text:p>
      <text:p text:style-name="P3"><text:tab/>- <text:span text:style-name="T2">Important Places detailed Overview</text:span></text:p>
      <text:p text:style-name="P3">- <text:span text:style-name="T1"><office:annotation office:name="__Annotation__42_2158220126" loext:resolved="false"><dc:creator>Unknown Author</dc:creator><dc:date>2026-04-09T11:36:49.357070200</dc:date><text:p text:style-name="P4">Varsoster (Homo varkhulensis)</text:p><text:p text:style-name="P5">The Varsoster is the quintessential expression of survival within Varkhul’s "Anchor." While other races developed complex magical or physiological workarounds for the planet's 11.11 m/s² gravity, the Varsoster met the challenge with raw structural reinforcement. Their biology is a masterclass in load-bearing efficiency, trading the lean elegance of ancestral humanity for a frame of immense mineral density and powerful, short-twitch musculature.</text:p><text:p text:style-name="P5"/><text:p text:style-name="P6">Varsoster Traits</text:p><text:p text:style-name="P5">Creature Type: Humanoid</text:p><text:p text:style-name="P5">Size: Medium (typically 5’4” to 6’0”). Despite their height, their high bone density makes them significantly heavier than they appear.</text:p><text:p text:style-name="P5">Speed: 30 feet</text:p><text:p text:style-name="P5">Life Span: Roughly 120 years. They reach maturity quickly, with the "autumn" of their lives beginning around age 60.</text:p><text:p text:style-name="P5">As a Varsoster, you have these special traits:</text:p><text:p text:style-name="P5">Gravitational Fortitude. Your skeletal structure is reinforced with a mineral lattice that accounts for 22% of your total body mass. You have Advantage on Saving Throws and Ability Checks made to avoid being knocked Prone or moved against your will.</text:p><text:p text:style-name="P5">Ocher Sight. Your eyes are evolved for the red-shifted spectrum of Varkhul’s K-type sun. You have Darkvision with a range of 60 feet. Within this range, you can discern colors only in shades of red, amber, and ocher.</text:p><text:p text:style-name="P5">The Workman’s Engine. Your respiratory system is optimized for the "Ocean of Air," utilizing powerful intercostal muscles to maintain high oxygen saturation even under physical duress. You have Proficiency in the Athletics skill.</text:p><text:p text:style-name="P5">Inured to the Weight. You have Resistance to falling damage. Additionally, you are never considered Encumbered by mundane gear or armor unless you are carrying more than ten times your Strength score.</text:p><text:p text:style-name="P5"/><text:p text:style-name="P5">Dr. Vica’s Field Note: The Ethics of Effort</text:p><text:p text:style-name="P5">"My people are not given to poetry; we are given to work. We measure our lives in harvests, in stone placed upon stone, and in the dull ache in our backs when the sun sets. To a Varsoster, beauty is found in a tool that does not break and a structure that refuses to yield to the Anchor. We do not look to the stars for salvation; we look to the ground, for it is the only thing that has never let us go."</text:p><text:p text:style-name="P5"/><text:p text:style-name="P5">For a full study of Varsoster skeletal calcification and the social history of the Era of Silence, see Dr. Vica’s Guide, Chapter 1.</text:p></office:annotation></text:span><text:span text:style-name="T1">Races</text:span><office:annotation-end office:name="__Annotation__42_2158220126"/><text:span text:style-name="T1"> in the Setting</text:span></text:p>
      <text:p text:style-name="P3"/>
      <text:p text:style-name="P3">- <text:span text:style-name="T1">Classes</text:span></text:p>
      <text:p text:style-name="P3"><text:tab/>- <text:span text:style-name="T1">Sub classes</text:span></text:p>
      <text:p text:style-name="P3">- <text:span text:style-name="T1">Backgrounds</text:span></text:p>
      <text:p text:style-name="P7">- Gods Descriptions</text:p>
      <text:p text:style-name="P7">- </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Medium" svg:font-family="'Montserrat Mediu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tserrat Medium" fo:font-family="'Montserrat Medium'"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7T22:04:15.849131200</meta:creation-date>
    <dc:date>2026-04-09T12:21:03.698365600</dc:date>
    <meta:editing-duration>PT45M22S</meta:editing-duration>
    <meta:editing-cycles>2</meta:editing-cycles>
    <meta:generator>LibreOffice/26.2.1.2$Windows_X86_64 LibreOffice_project/620$Build-2</meta:generator>
    <meta:document-statistic meta:table-count="0" meta:image-count="0" meta:object-count="0" meta:page-count="2" meta:paragraph-count="12" meta:word-count="38" meta:character-count="227" meta:non-whitespace-character-count="196"/>
  </office:meta>
</office:document-meta>
</file>
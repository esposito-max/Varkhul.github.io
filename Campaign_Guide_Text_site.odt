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language="pt" fo:country="BR" style:text-underline-style="none"/>
    </style:style>
    <style:style style:name="P2" style:family="paragraph" style:parent-style-name="Standard">
      <style:text-properties fo:language="pt" fo:country="BR" style:text-underline-style="none" officeooo:paragraph-rsid="000ce236"/>
    </style:style>
    <style:style style:name="P3" style:family="paragraph" style:parent-style-name="Standard">
      <style:text-properties style:text-underline-style="none" officeooo:paragraph-rsid="000ce236"/>
    </style:style>
    <style:style style:name="P4" style:family="paragraph" style:parent-style-name="Standard">
      <style:paragraph-properties style:writing-mode="lr-tb" style:writing-mode-automatic="false"/>
      <style:text-properties fo:language="pt" fo:country="BR" style:text-underline-style="none" officeooo:paragraph-rsid="000ce236"/>
    </style:style>
    <style:style style:name="P5" style:family="paragraph" style:parent-style-name="Standard">
      <style:paragraph-properties style:writing-mode="lr-tb" style:writing-mode-automatic="false"/>
      <style:text-properties fo:language="pt" fo:country="BR" style:text-underline-style="none" officeooo:rsid="000b1849" officeooo:paragraph-rsid="000ce236"/>
    </style:style>
    <style:style style:name="P6" style:family="paragraph" style:parent-style-name="Standard">
      <style:paragraph-properties style:writing-mode="lr-tb" style:writing-mode-automatic="false"/>
      <style:text-properties fo:language="pt" fo:country="BR" style:text-underline-style="none" officeooo:rsid="000bfec3" officeooo:paragraph-rsid="000ce236"/>
    </style:style>
    <style:style style:name="P7" style:family="paragraph" style:parent-style-name="Standard">
      <style:paragraph-properties style:writing-mode="lr-tb" style:writing-mode-automatic="false"/>
      <style:text-properties fo:language="pt" fo:country="BR" style:text-underline-style="none" fo:font-weight="bold" officeooo:rsid="000ce236" officeooo:paragraph-rsid="000ce236" style:font-weight-asian="bold" style:font-weight-complex="bold"/>
    </style:style>
    <style:style style:name="P8" style:family="paragraph" style:parent-style-name="Standard">
      <style:paragraph-properties style:writing-mode="lr-tb" style:writing-mode-automatic="false"/>
      <style:text-properties fo:language="pt" fo:country="BR" style:text-underline-style="none" fo:font-weight="normal" officeooo:rsid="000e3e2a" officeooo:paragraph-rsid="000e3e2a" style:font-weight-asian="normal" style:font-weight-complex="normal"/>
    </style:style>
    <style:style style:name="P9" style:family="paragraph" style:parent-style-name="Standard">
      <style:paragraph-properties style:writing-mode="lr-tb" style:writing-mode-automatic="false"/>
      <style:text-properties fo:language="pt" fo:country="BR" style:text-underline-style="none" fo:font-weight="bold" officeooo:rsid="000ce236" officeooo:paragraph-rsid="000fd08c" style:font-weight-asian="bold" style:font-weight-complex="bold"/>
    </style:style>
    <style:style style:name="P10" style:family="paragraph" style:parent-style-name="Standard">
      <style:paragraph-properties style:writing-mode="lr-tb" style:writing-mode-automatic="false"/>
      <style:text-properties style:text-underline-style="none" officeooo:paragraph-rsid="000fd08c"/>
    </style:style>
    <style:style style:name="P11" style:family="paragraph" style:parent-style-name="Standard">
      <style:paragraph-properties style:writing-mode="lr-tb" style:writing-mode-automatic="false"/>
      <style:text-properties fo:language="pt" fo:country="BR" style:text-underline-style="none" fo:font-weight="bold" officeooo:rsid="000ce236" officeooo:paragraph-rsid="00104952" style:font-weight-asian="bold" style:font-weight-complex="bold"/>
    </style:style>
    <style:style style:name="P12" style:family="paragraph" style:parent-style-name="Standard">
      <style:paragraph-properties style:writing-mode="lr-tb" style:writing-mode-automatic="false"/>
      <style:text-properties fo:language="pt" fo:country="BR" style:text-underline-style="none" fo:font-weight="bold" officeooo:rsid="000ce236" officeooo:paragraph-rsid="00104952"/>
    </style:style>
    <style:style style:name="P13" style:family="paragraph" style:parent-style-name="Standard">
      <style:paragraph-properties style:writing-mode="lr-tb" style:writing-mode-automatic="false"/>
      <style:text-properties fo:language="pt" fo:country="BR" style:text-underline-style="none" fo:font-weight="normal" officeooo:rsid="000e3e2a" officeooo:paragraph-rsid="0010503e" style:font-weight-asian="normal" style:font-weight-complex="normal"/>
    </style:style>
    <style:style style:name="T1" style:family="text">
      <style:text-properties officeooo:rsid="00073c50"/>
    </style:style>
    <style:style style:name="T2" style:family="text">
      <style:text-properties officeooo:rsid="00061a6a"/>
    </style:style>
    <style:style style:name="T3" style:family="text">
      <style:text-properties fo:font-style="italic" fo:font-weight="bold" officeooo:rsid="00061a6a" style:font-style-asian="italic" style:font-weight-asian="bold" style:font-style-complex="italic" style:font-weight-complex="bold"/>
    </style:style>
    <style:style style:name="T4" style:family="text">
      <style:text-properties fo:font-weight="normal" officeooo:rsid="00061fa9" style:font-weight-asian="normal" style:font-weight-complex="normal"/>
    </style:style>
    <style:style style:name="T5" style:family="text">
      <style:text-properties fo:font-weight="normal" officeooo:rsid="00073c50" style:font-weight-asian="normal" style:font-weight-complex="normal"/>
    </style:style>
    <style:style style:name="T6" style:family="text">
      <style:text-properties fo:font-weight="normal" officeooo:rsid="000ce236" style:font-weight-asian="normal" style:font-weight-complex="normal"/>
    </style:style>
    <style:style style:name="T7" style:family="text">
      <style:text-properties fo:font-weight="normal" officeooo:rsid="00061a6a" style:font-weight-asian="normal" style:font-weight-complex="normal"/>
    </style:style>
    <style:style style:name="T8" style:family="text">
      <style:text-properties fo:font-style="italic" fo:font-weight="normal" officeooo:rsid="00061fa9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935bf" style:font-style-asian="italic" style:font-weight-asian="normal" style:font-style-complex="italic" style:font-weight-complex="normal"/>
    </style:style>
    <style:style style:name="T10" style:family="text">
      <style:text-properties officeooo:rsid="00061fa9"/>
    </style:style>
    <style:style style:name="T11" style:family="text">
      <style:text-properties fo:language="pt" fo:country="BR" fo:font-weight="normal" officeooo:rsid="00061fa9" style:font-weight-asian="normal" style:font-weight-complex="normal"/>
    </style:style>
    <style:style style:name="T12" style:family="text">
      <style:text-properties fo:language="pt" fo:country="BR" fo:font-weight="normal" officeooo:rsid="00073c50" style:font-weight-asian="normal" style:font-weight-complex="normal"/>
    </style:style>
    <style:style style:name="T13" style:family="text">
      <style:text-properties fo:language="pt" fo:country="BR" fo:font-weight="normal" officeooo:rsid="000ce236" style:font-weight-asian="normal" style:font-weight-complex="normal"/>
    </style:style>
    <style:style style:name="T14" style:family="text">
      <style:text-properties fo:language="pt" fo:country="BR" fo:font-style="italic" fo:font-weight="normal" officeooo:rsid="00061fa9" style:font-style-asian="italic" style:font-weight-asian="normal" style:font-style-complex="italic" style:font-weight-complex="normal"/>
    </style:style>
    <style:style style:name="T15" style:family="text">
      <style:text-properties fo:language="pt" fo:country="BR" fo:font-style="italic" fo:font-weight="normal" officeooo:rsid="000935bf" style:font-style-asian="italic" style:font-weight-asian="normal" style:font-style-complex="italic" style:font-weight-complex="normal"/>
    </style:style>
    <style:style style:name="T16" style:family="text">
      <style:text-properties fo:language="pt" fo:country="BR" fo:font-weight="normal" officeooo:rsid="000935bf" style:font-weight-asian="normal" style:font-weight-complex="normal"/>
    </style:style>
    <style:style style:name="T17" style:family="text">
      <style:text-properties fo:font-style="italic" officeooo:rsid="00073c50" style:font-style-asian="italic" style:font-style-complex="italic"/>
    </style:style>
    <style:style style:name="T18" style:family="text">
      <style:text-properties officeooo:rsid="000b1849"/>
    </style:style>
    <style:style style:name="T19" style:family="text">
      <style:text-properties style:text-position="sub 58%" officeooo:rsid="000b184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bfec3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0ce236"/>
    </style:style>
    <style:style style:name="T24" style:family="text">
      <style:text-properties fo:font-style="italic" officeooo:rsid="000ce236" style:font-style-asian="italic" style:font-style-complex="italic"/>
    </style:style>
    <style:style style:name="T25" style:family="text">
      <style:text-properties fo:font-variant="normal" fo:text-transform="none" fo:color="#000000" loext:opacity="100%" style:text-line-through-style="none" style:text-line-through-type="none" fo:font-family="'Times New Roman', serif" fo:font-size="12pt" fo:font-style="normal" fo:font-weight="normal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family="'Times New Roman', serif" fo:font-size="12pt" fo:language="pt" fo:country="BR" fo:font-style="normal" fo:font-weight="normal" officeooo:rsid="000ce236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1f1f1f" loext:opacity="100%" style:text-line-through-style="none" style:text-line-through-type="none" fo:font-family="'Times New Roman'" style:font-family-generic="roman" style:font-pitch="variable" fo:font-size="12pt" fo:language="pt" fo:country="BR" fo:font-style="normal" fo:font-weight="normal" officeooo:rsid="000ce236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1f1f1f" loext:opacity="100%" style:text-line-through-style="none" style:text-line-through-type="none" fo:font-family="'Times New Roman'" style:font-family-generic="roman" style:font-pitch="variable" fo:font-size="12pt" fo:language="pt" fo:country="BR" fo:font-style="normal" fo:font-weight="normal" officeooo:rsid="00061fa9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1f1f1f" loext:opacity="100%" style:text-line-through-style="none" style:text-line-through-type="none" fo:font-family="'Times New Roman'" style:font-family-generic="roman" style:font-pitch="variable" fo:font-size="12pt" fo:language="pt" fo:country="BR" fo:font-style="normal" fo:font-weight="normal" officeooo:rsid="00073c50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1f1f1f" loext:opacity="100%" style:text-line-through-style="none" style:text-line-through-type="none" fo:font-family="'Times New Roman'" style:font-family-generic="roman" style:font-pitch="variable" fo:font-size="12pt" fo:language="pt" fo:country="BR" fo:font-style="italic" fo:font-weight="normal" officeooo:rsid="00061fa9" style:text-blinking="false" fo:background-color="transparent" loext:char-shading-value="0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fo:color="#1f1f1f" loext:opacity="100%" style:text-line-through-style="none" style:text-line-through-type="none" fo:font-family="'Times New Roman'" style:font-family-generic="roman" style:font-pitch="variable" fo:font-size="12pt" fo:language="pt" fo:country="BR" fo:font-style="italic" fo:font-weight="normal" officeooo:rsid="000935bf" style:text-blinking="false" fo:background-color="transparent" loext:char-shading-value="0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officeooo:rsid="000935b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weight="normal" officeooo:rsid="0010495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á campanha possui alterações significativas em relação as regras <text:span text:style-name="T1">padrão</text:span>. Em suma, utilizara<text:span text:style-name="T1">m</text:span>-se <text:span text:style-name="T2">as regras apresentadas nos livros publicados para o sistema </text:span><text:span text:style-name="T3">D&amp;D 5.5e</text:span><text:span text:style-name="T2"> publicados em 2024/2025. Exceto pelos seguintes aspectos:</text:span></text:p>
      <text:p text:style-name="P2"><text:span text:style-name="T4">&lt;</text:span><text:span text:style-name="T5">span class="</text:span><text:span text:style-name="T6">bullet</text:span><text:span text:style-name="T5">"&gt;</text:span><text:span text:style-name="T7">Aumento de Atributo/</text:span><text:span text:style-name="T6">A</text:span><text:span text:style-name="T7">quisição de talento</text:span><text:span text:style-name="T8">&lt;/</text:span><text:span text:style-name="T9">span&gt;</text:span><text:span text:style-name="T2">: Será realizado conforme apresentado na edição 3.5e, onde se recebe um </text:span><text:span text:style-name="T4">&lt;</text:span><text:span text:style-name="T5">span </text:span><text:span text:style-name="T2">class="lore-term" data-key= ""</text:span><text:span text:style-name="T5">&gt;</text:span><text:span text:style-name="T2">talento</text:span><text:span text:style-name="T8">&lt;/</text:span><text:span text:style-name="T9">span&gt;</text:span><text:span text:style-name="T2"> no nível 1, e novamente no 3º Nível e após a cada novo terceiro nível adquirido na mesma classe (3, 6, 9, etc), isto além de quaisquer talentos adquiridos como parte da classe (ex: Guerreiros receberão </text:span><text:span text:style-name="T10">dois</text:span><text:span text:style-name="T2"> talento</text:span><text:span text:style-name="T10">s</text:span><text:span text:style-name="T2"> no nível 6, já que </text:span><text:span text:style-name="T10">uma destas instâncias </text:span><text:span text:style-name="T2">é um talento recebido como característica de classe</text:span><text:span text:style-name="T10">)</text:span><text:span text:style-name="T2">. Já o aumento será mantido sempre a cada 4 níveis. Não podendo ser trocado um </text:span><text:span text:style-name="T10">talento extra.</text:span></text:p>
      <text:p text:style-name="P3"><text:span text:style-name="T11">&lt;</text:span><text:span text:style-name="T12">span class="</text:span><text:span text:style-name="T13">bullet</text:span><text:span text:style-name="T12">"&gt;</text:span><text:span text:style-name="T11">Rolagens Secretas</text:span><text:span text:style-name="T14">&lt;/</text:span><text:span text:style-name="T15">span&gt;</text:span><text:span text:style-name="T11">: Todos os testes de &lt;</text:span><text:span text:style-name="T12">span </text:span>class="lore-term" data-key= ""<text:span text:style-name="T12">&gt;</text:span><text:span text:style-name="T14">Intuição&lt;/</text:span><text:span text:style-name="T15">span&gt;</text:span><text:span text:style-name="T11"> e &lt;</text:span><text:span text:style-name="T16">span </text:span>class="lore-term"<text:span text:style-name="T16">&gt;</text:span><text:span text:style-name="T14">Morte&lt;/</text:span><text:span text:style-name="T15">span&gt;</text:span><text:span text:style-name="T11"> serão realizados pelo mestre. Os de intuição não terão seu valor numérico revelado, já os de morte, o jogador que o está fazendo será notificado do valor.</text:span></text:p>
      <text:p text:style-name="P4"><text:span text:style-name="T4">&lt;</text:span><text:span text:style-name="T5">span class="</text:span><text:span text:style-name="T6">bullet</text:span><text:span text:style-name="T5">"&gt;Multiclasse</text:span><text:span text:style-name="T8">&lt;/</text:span><text:span text:style-name="T9">span&gt;</text:span><text:span text:style-name="T1">: O conceito de </text:span><text:span text:style-name="T4">&lt;</text:span><text:span text:style-name="T5">span </text:span><text:span text:style-name="T1">class="lore-term" data-key= ""</text:span><text:span text:style-name="T5">&gt;</text:span><text:span text:style-name="T17">multiclasse</text:span><text:span text:style-name="T8">&lt;/</text:span><text:span text:style-name="T9">span&gt;</text:span><text:span text:style-name="T1"> é proibido, exceto em casos aprovados pelo mestre.</text:span></text:p>
      <text:p text:style-name="P4"><text:span text:style-name="T4">&lt;</text:span><text:span text:style-name="T5">span class="</text:span><text:span text:style-name="T6">bullet</text:span><text:span text:style-name="T5">"&gt;Atributos</text:span><text:span text:style-name="T1">: </text:span><text:span text:style-name="T18">Você possui o seguinte conjunto de atributos para distribuir como quiser: 3</text:span><text:span text:style-name="T19">0</text:span><text:span text:style-name="T18">, 3, 2</text:span><text:span text:style-name="T19">0</text:span><text:span text:style-name="T18">, 2, 1, -2</text:span><text:span text:style-name="T19">0</text:span></text:p>
      <text:p text:style-name="P5"><text:span text:style-name="T4">&lt;</text:span><text:span text:style-name="T5">span class="</text:span><text:span text:style-name="T6">bullet</text:span><text:span text:style-name="T5">"&gt;</text:span><text:span text:style-name="T20">Livros permitidos</text:span><text:span text:style-name="T8">&lt;/</text:span><text:span text:style-name="T9">span&gt;</text:span>: Serão Permitidos todos os livros <text:span text:style-name="T21">publicados a partir de 2020 (Caso haja algo em um livro anterior que deseje utilizar, favor falar com o mestre)</text:span></text:p>
      <text:p text:style-name="P6"><text:span text:style-name="T4">&lt;</text:span><text:span text:style-name="T5">span class="</text:span><text:span text:style-name="T6">bullet</text:span><text:span text:style-name="T5">"&gt;</text:span><text:span text:style-name="T20">Raças/Espécies</text:span><text:span text:style-name="T8">&lt;/</text:span><text:span text:style-name="T9">span&gt;</text:span>: Só poderão ser utilizadas as raças/espécies apresentadas aqui, caso queira utilizar uma não apresentada, converse com o Mestre.</text:p>
      <text:p text:style-name="P6"><text:span text:style-name="T4">&lt;</text:span><text:span text:style-name="T5">span class="</text:span><text:span text:style-name="T6">bullet</text:span><text:span text:style-name="T5">"&gt;</text:span><text:span text:style-name="T20">Backstory</text:span><text:span text:style-name="T8">&lt;/</text:span><text:span text:style-name="T9">span&gt;</text:span>: O mundo está em criação, portanto tens liberdade de criar quaisquer material (desde que faça sentido) que suporte sua <text:span text:style-name="T1"><text:s/></text:span><text:span text:style-name="T4">&lt;</text:span><text:span text:style-name="T5">span </text:span><text:span text:style-name="T1">class="lore-term" data-key= ""</text:span><text:span text:style-name="T5">&gt;</text:span><text:span text:style-name="T22">Backstory</text:span><text:span text:style-name="T8">&lt;/</text:span><text:span text:style-name="T9">span&gt;</text:span><text:span text:style-name="T22">.</text:span> <text:span text:style-name="T23">E além disso não há limite (exceto o da razoabilidade) do tamanho da sua </text:span><text:span text:style-name="T24">Backstory</text:span><text:span text:style-name="T23">.</text:span></text:p>
      <text:p text:style-name="P7"><text:span text:style-name="T4">&lt;</text:span><text:span text:style-name="T5">span class="</text:span><text:span text:style-name="T20">bullet</text:span><text:span text:style-name="T5">"&gt;</text:span><text:span text:style-name="T20">Criação de personagem</text:span><text:span text:style-name="T8">&lt;/</text:span><text:span text:style-name="T9">span&gt;</text:span><text:span text:style-name="T20">: O personagem deverá ser criado no nível 1, para a realização da(s) sessões individuais, mas planeje até o nível 3 pois a campanha terá início no nível 3.</text:span></text:p>
      <text:p text:style-name="P8">=========================================================================</text:p>
      <text:p text:style-name="P8">Existem as seguintes <text:span text:style-name="T21">Raças/Espécies </text:span>em Varkhul:</text:p>
      <text:p text:style-name="P9"><text:span text:style-name="T4">&lt;</text:span><text:span text:style-name="T5">span class="</text:span><text:span text:style-name="T20">bullet</text:span><text:span text:style-name="T5">"&gt;</text:span><text:span text:style-name="T25">Evengadul</text:span><text:span text:style-name="T8">&lt;/</text:span><text:span text:style-name="T9">span&gt;</text:span><text:span text:style-name="T20">: Os </text:span><text:span text:style-name="T4">&lt;</text:span><text:span text:style-name="T5">span class="lore-term" data-key= ""&gt;</text:span><text:span text:style-name="T20">Evengadul</text:span><text:span text:style-name="T8">&lt;/</text:span><text:span text:style-name="T9">span&gt;</text:span><text:span text:style-name="T20"> são a âncora do nosso espectro biológico. Eles demonstram que em um mundo de alta gravidade e calor, uma estratégia bem-sucedida é tornar-se o ambiente. Eles não se adaptam à pedra; eles sintetizaram a pedra em sua própria carne. Eles são lentos, deliberados e quase indestrutíveis, construídos para suportar a pressão que esmaga os outros.</text:span></text:p>
      <text:p text:style-name="P10"><text:span text:style-name="T11">&lt;</text:span><text:span text:style-name="T12">span class="</text:span><text:span text:style-name="T13">bullet</text:span><text:span text:style-name="T12">"&gt;</text:span><text:span text:style-name="T26">Gnettheves</text:span><text:span text:style-name="T14">&lt;/</text:span><text:span text:style-name="T15">span&gt;</text:span><text:span text:style-name="T13">:</text:span><text:span text:style-name="T27">Os </text:span><text:span text:style-name="T28">&lt;</text:span><text:span text:style-name="T29">span class="lore-term" data-key= ""&gt;</text:span><text:span text:style-name="T27">Gnetthyes</text:span><text:span text:style-name="T30">&lt;/</text:span><text:span text:style-name="T31">span&gt;</text:span><text:span text:style-name="T27"> são uma reparação biológica pela guerra. Eles são projetados para curar, acalmar e iluminar. Mas são um milagre custoso. Eles queimam recursos, não podem se esconder e estão para sempre ligados aos seus gêmeos sombrios. Eles não são anjos; são reatores vivos, mantendo o frio do Vazio afastado com o calor de seu próprio sangue.</text:span></text:p>
      <text:p text:style-name="P11"><text:span text:style-name="T4">&lt;</text:span><text:span text:style-name="T5">span class="</text:span><text:span text:style-name="T20">bullet</text:span><text:span text:style-name="T5">"&gt;</text:span><text:span text:style-name="T25">Gnetunin</text:span><text:span text:style-name="T8">&lt;/</text:span><text:span text:style-name="T9">span&gt;</text:span><text:span text:style-name="T20">: Os </text:span><text:span text:style-name="T4">&lt;</text:span><text:span text:style-name="T5">span class="lore-term" data-key= ""&gt;</text:span><text:span text:style-name="T20">Gnetunin</text:span><text:span text:style-name="T8">&lt;/</text:span><text:span text:style-name="T9">span&gt;</text:span><text:span text:style-name="T20"> não são meramente “marinheiros” por cultura; eles são marinheiros por mandato biológico. Eles são o predador alfa anfíbio. Eles passaram da caça de persistência nas planícies para a caça de persistência nas marés, carregando sua densidade com eles. Eles são a única raça que olha para a gravidade pesada de Varkhul e ri, pois conhecem um mundo onde podem voar.</text:span></text:p>
      <text:p text:style-name="P9"><text:span text:style-name="T4">&lt;</text:span><text:span text:style-name="T5">span class="</text:span><text:span text:style-name="T20">bullet</text:span><text:span text:style-name="T5">"&gt;</text:span><text:span text:style-name="T25">Gnottover</text:span><text:span text:style-name="T8">&lt;/</text:span><text:span text:style-name="T9">span&gt;</text:span><text:span text:style-name="T20">:Os </text:span><text:span text:style-name="T4">&lt;</text:span><text:span text:style-name="T5">span class="lore-term" data-key= ""&gt;</text:span><text:span text:style-name="T20">Gnottover</text:span><text:span text:style-name="T8">&lt;/</text:span><text:span text:style-name="T9">span&gt;</text:span><text:span text:style-name="T20"> são os mais incompreendidos de nossos semelhantes. Eles são temidos como “tocados pelo Vazio”, mas a biologia mostra que são sobreviventes de primeira ordem. Eles foram construídos para suportar uma </text:span><text:soft-page-break/><text:span text:style-name="T20">estrela moribunda, para encontrar energia onde não há nenhuma e para silenciar o ruído caótico que ameaça rasgar a mente. Eles não são os monstros da escuridão; são o escudo que a absorve.</text:span></text:p>
      <text:p text:style-name="P9"><text:span text:style-name="T4">&lt;</text:span><text:span text:style-name="T5">span class="</text:span><text:span text:style-name="T20">bullet</text:span><text:span text:style-name="T5">"&gt;</text:span><text:span text:style-name="T25">Krymatemoun</text:span><text:span text:style-name="T8">&lt;/</text:span><text:span text:style-name="T9">span&gt;</text:span><text:span text:style-name="T20">: Os </text:span><text:span text:style-name="T4">&lt;</text:span><text:span text:style-name="T5">span class="lore-term" data-key= ""&gt;</text:span><text:span text:style-name="T20">Krymatemoun</text:span><text:span text:style-name="T8">&lt;/</text:span><text:span text:style-name="T9">span&gt; </text:span><text:span text:style-name="T32">eram os zênite da evolução biológica: potência absoluta, custo vital extremo e equilíbrio frágil</text:span><text:span text:style-name="T33"> </text:span><text:span text:style-name="T20">Eles foram construídos para canalizar as energias que quebraram o mundo, e quando o mundo se acomodou no mundano, eles se tornaram obsoletos.</text:span></text:p>
      <text:p text:style-name="P11"><text:span text:style-name="T4">&lt;</text:span><text:span text:style-name="T5">span class="</text:span><text:span text:style-name="T20">bullet</text:span><text:span text:style-name="T5">"&gt;</text:span><text:span text:style-name="T25">Lloviane</text:span><text:span text:style-name="T8">&lt;/</text:span><text:span text:style-name="T9">span&gt;</text:span><text:span text:style-name="T20">: Os </text:span><text:span text:style-name="T4">&lt;</text:span><text:span text:style-name="T5">span class="lore-term" data-key= ""&gt;</text:span><text:span text:style-name="T20">Lloviane</text:span><text:span text:style-name="T8">&lt;/</text:span><text:span text:style-name="T9">span&gt;</text:span><text:span text:style-name="T20"> são o resultado de uma aposta evolutiva: trocar durabilidade e velocidade reprodutiva por eficiência e precisão. Eles estão perfeitamente adaptados à gravidade de Varkhul não lutando contra ela, mas sobrevivendo a ela. Eles são os arquivos vivos do nosso mundo, seus próprios corpos construídos para suportar a lenta erosão do tempo que reclama o resto de nós.</text:span></text:p>
      <text:p text:style-name="P11"><text:span text:style-name="T4">&lt;</text:span><text:span text:style-name="T5">span class="</text:span><text:span text:style-name="T20">bullet</text:span><text:span text:style-name="T5">"&gt;</text:span><text:span text:style-name="T25">Smaragblut</text:span><text:span text:style-name="T8">&lt;/</text:span><text:span text:style-name="T9">span&gt;</text:span><text:span text:style-name="T20">: Os </text:span><text:span text:style-name="T4">&lt;</text:span><text:span text:style-name="T5">span class="lore-term" data-key= ""&gt;</text:span><text:span text:style-name="T20">Smaragblut</text:span><text:span text:style-name="T8">&lt;/</text:span><text:span text:style-name="T9">span&gt;</text:span><text:span text:style-name="T20"> são uma contradição à natureza pesada e lenta do nosso mundo. Eles são rápidos, brilhantes e queimam com calor em uma terra fria. Eles são o resultado de um caminho evolutivo que escolheu a complexidade em vez da durabilidade — usando uma cauda para trapacear a gravidade e uma língua de degustação para mapear o invisível. Eles não são dragões, mas são a coisa mais próxima que esta terra pesada permitirá existir.</text:span></text:p>
      <text:p text:style-name="P12"><text:span text:style-name="T4">&lt;</text:span><text:span text:style-name="T5">span class="</text:span><text:span text:style-name="T20">bullet</text:span><text:span text:style-name="T5">"&gt;</text:span><text:span text:style-name="T25">Varsosters</text:span><text:span text:style-name="T8">&lt;/</text:span><text:span text:style-name="T9">span&gt;</text:span><text:span text:style-name="T20">: </text:span><text:span text:style-name="T34">Os </text:span><text:span text:style-name="T4">&lt;</text:span><text:span text:style-name="T5">span class="lore-term" data-key= ""&gt;</text:span><text:span text:style-name="T34">Varsosters</text:span><text:span text:style-name="T8">&lt;/</text:span><text:span text:style-name="T9">span&gt;</text:span><text:span text:style-name="T20"> </text:span><text:span text:style-name="T34">sã</text:span><text:span text:style-name="T20">o motor de Varkhul. S</text:span><text:span text:style-name="T34">ão</text:span><text:span text:style-name="T20"> construídos de osso denso e sangue rápido. </text:span><text:span text:style-name="T34">Eles n</text:span><text:span text:style-name="T20">ão </text:span><text:span text:style-name="T34">possuem</text:span><text:span text:style-name="T20"> a durabilidade cristalina dos Evengadul nem o luxo temporal dos Lloviane. S</text:span><text:span text:style-name="T34">ão</text:span><text:span text:style-name="T20"> máquinas biológicas projetadas para o trabalho, para a rápida rotatividade de gerações e para a conquista da terra através de pura resistência</text:span></text:p>
      <text:p text:style-name="P13">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mul" fo:country="non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mul" fo:country="non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5T23:21:21.659130400</meta:creation-date>
    <dc:date>2026-04-26T03:13:07.948390700</dc:date>
    <meta:editing-duration>PT32M21S</meta:editing-duration>
    <meta:editing-cycles>1</meta:editing-cycles>
    <meta:document-statistic meta:table-count="0" meta:image-count="0" meta:object-count="0" meta:page-count="2" meta:paragraph-count="20" meta:word-count="829" meta:character-count="5978" meta:non-whitespace-character-count="5167"/>
    <meta:generator>LibreOffice/26.2.1.2$Windows_X86_64 LibreOffice_project/620$Build-2</meta:generator>
  </office:meta>
</office:document-meta>
</file>